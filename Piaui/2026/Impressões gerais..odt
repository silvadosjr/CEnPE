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D0000031D057B4E4C.png" manifest:media-type="image/png"/>
  <manifest:file-entry manifest:full-path="Pictures/100000000000031D0000031D8BE4AF44.png" manifest:media-type="image/png"/>
  <manifest:file-entry manifest:full-path="Pictures/100000000000031D0000031DE0E95FA3.png" manifest:media-type="image/png"/>
  <manifest:file-entry manifest:full-path="Pictures/100000000000031D0000031DAC25F345.png" manifest:media-type="image/png"/>
  <manifest:file-entry manifest:full-path="Pictures/100000000000034800000348305CE5BE.png" manifest:media-type="image/png"/>
  <manifest:file-entry manifest:full-path="Pictures/100000000000031D0000031D52CBBC98.png" manifest:media-type="image/png"/>
  <manifest:file-entry manifest:full-path="Pictures/1000000000000348000003486AC72A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eaa7" officeooo:paragraph-rsid="0001eaa7"/>
    </style:style>
    <style:style style:name="P2" style:family="paragraph" style:parent-style-name="Standard">
      <style:paragraph-properties fo:break-before="page"/>
      <style:text-properties officeooo:rsid="0001eaa7" officeooo:paragraph-rsid="0001eaa7"/>
    </style:style>
    <style:style style:name="P3" style:family="paragraph" style:parent-style-name="Standard">
      <style:paragraph-properties fo:break-before="page"/>
      <style:text-properties officeooo:rsid="000401fb" officeooo:paragraph-rsid="000401fb"/>
    </style:style>
    <style:style style:name="P4" style:family="paragraph" style:parent-style-name="Standard">
      <style:text-properties officeooo:rsid="000401fb" officeooo:paragraph-rsid="000401fb"/>
    </style:style>
    <style:style style:name="P5" style:family="paragraph" style:parent-style-name="Standard">
      <style:paragraph-properties fo:break-before="page"/>
      <style:text-properties officeooo:rsid="0005f7b5" officeooo:paragraph-rsid="0005f7b5"/>
    </style:style>
    <style:style style:name="P6" style:family="paragraph" style:parent-style-name="Standard">
      <style:text-properties officeooo:rsid="0005f7b5" officeooo:paragraph-rsid="0005f7b5"/>
    </style:style>
    <style:style style:name="T1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ressões gerais sobre os resultados dos simulados do Piauí 2ª e 3ª séries (MT e LP).</text:p>
      <text:p text:style-name="P1"/>
      <text:p text:style-name="P1">3EM – MT – S<text:span text:style-name="T1">2</text:span></text:p>
      <text:p text:style-name="P1"/>
      <text:p text:style-name="P1">Item 14 foi excluído da análise. Possível conflito de gabarito. Estimativa do parâmetro dificuldade muito acima da média.</text:p>
      <text:p text:style-name="P1"/>
      <text:p text:style-name="P1"><draw:frame draw:style-name="fr1" draw:name="Figura1" text:anchor-type="char" svg:width="17cm" svg:height="17cm" draw:z-index="0"><draw:image xlink:href="Pictures/100000000000031D0000031DE0E95FA3.png" xlink:type="simple" xlink:show="embed" xlink:actuate="onLoad" draw:mime-type="image/png"/></draw:frame><text:s/></text:p>
      <text:p text:style-name="P1"/>
      <text:p text:style-name="P1"/>
      <text:p text:style-name="P2">3EM-MT-S1</text:p>
      <text:p text:style-name="P1"/>
      <text:p text:style-name="P1">Item 08 (Prova 2025) fixado no simulado II, não apresentou bom ajuste no simulado I, e por isso foi excluído. Também há possível conflito de gabarito.</text:p>
      <text:p text:style-name="P1"/>
      <text:p text:style-name="P1"><draw:frame draw:style-name="fr1" draw:name="Figura2" text:anchor-type="char" svg:width="17cm" svg:height="17cm" draw:z-index="1"><draw:image xlink:href="Pictures/100000000000031D0000031D8BE4AF44.png" xlink:type="simple" xlink:show="embed" xlink:actuate="onLoad" draw:mime-type="image/png"/></draw:frame><text:s/></text:p>
      <text:p text:style-name="P1"/>
      <text:p text:style-name="P1"/>
      <text:p text:style-name="P3">3EM – LP – S2</text:p>
      <text:p text:style-name="P4"/>
      <text:p text:style-name="P4">Itens 08, 012, 020. TCM indicou possível conflito de gabaritos. Excluídos da TRI: estimativas dos parâmetros de dificuldade bem acima da média.</text:p>
      <text:p text:style-name="P4"/>
      <text:p text:style-name="P4"><draw:frame draw:style-name="fr2" draw:name="Figura3" text:anchor-type="char" svg:width="17cm" svg:height="17cm" draw:z-index="2"><draw:image xlink:href="Pictures/100000000000031D0000031D057B4E4C.png" xlink:type="simple" xlink:show="embed" xlink:actuate="onLoad" draw:mime-type="image/png"/></draw:frame><text:s/></text:p>
      <text:p text:style-name="P4"/>
      <text:p text:style-name="P3"><draw:frame draw:style-name="fr2" draw:name="Figura4" text:anchor-type="char" svg:width="17cm" svg:height="17cm" draw:z-index="3"><draw:image xlink:href="Pictures/100000000000031D0000031DAC25F345.png" xlink:type="simple" xlink:show="embed" xlink:actuate="onLoad" draw:mime-type="image/png"/></draw:frame><text:s text:c="2"/></text:p>
      <text:p text:style-name="P4"/>
      <text:p text:style-name="P4"><draw:frame draw:style-name="fr1" draw:name="Figura5" text:anchor-type="char" svg:width="17cm" svg:height="17cm" draw:z-index="4"><draw:image xlink:href="Pictures/100000000000031D0000031D52CBBC98.png" xlink:type="simple" xlink:show="embed" xlink:actuate="onLoad" draw:mime-type="image/png"/></draw:frame><text:soft-page-break/><text:s text:c="2"/></text:p>
      <text:p text:style-name="P4"/>
      <text:p text:style-name="P4"/>
      <text:p text:style-name="P4"/>
      <text:p text:style-name="P5">2EM – LP – S1</text:p>
      <text:p text:style-name="P6"/>
      <text:p text:style-name="P6">TCM indica itens 09 e 21 com possíveis conflitos de gabarito. Item 21 excluído na TRI: dificuldade muito acima da média, lentidão no processo de estimação.</text:p>
      <text:p text:style-name="P6"/>
      <text:p text:style-name="P6"><draw:frame draw:style-name="fr2" draw:name="Figura6" text:anchor-type="char" svg:width="17cm" svg:height="17cm" draw:z-index="5"><draw:image xlink:href="Pictures/1000000000000348000003486AC72A98.png" xlink:type="simple" xlink:show="embed" xlink:actuate="onLoad" draw:mime-type="image/png"/></draw:frame><text:s text:c="2"/></text:p>
      <text:p text:style-name="P6"><draw:frame draw:style-name="fr1" draw:name="Figura7" text:anchor-type="char" svg:width="17cm" svg:height="17cm" draw:z-index="6"><draw:image xlink:href="Pictures/100000000000034800000348305CE5B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11:45:36.432112200</meta:creation-date>
    <dc:date>2026-06-20T12:43:54.747552900</dc:date>
    <meta:editing-duration>PT37M41S</meta:editing-duration>
    <meta:editing-cycles>2</meta:editing-cycles>
    <meta:generator>LibreOffice/25.2.7.2$Windows_X86_64 LibreOffice_project/5cbfd1ab6520636bb5f7b99185aa69bd7456825d</meta:generator>
    <meta:document-statistic meta:table-count="0" meta:image-count="7" meta:object-count="0" meta:page-count="7" meta:paragraph-count="15" meta:word-count="118" meta:character-count="712" meta:non-whitespace-character-count="588"/>
  </office:meta>
</office:document-meta>
</file>